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0402in" fo:margin-bottom="0.0598in" style:contextual-spacing="false" fo:line-height="115%" fo:text-align="center" style:justify-single-word="false"/>
      <style:text-properties fo:font-size="16pt" officeooo:rsid="001122f3" officeooo:paragraph-rsid="001122f3" style:font-size-asian="16pt" style:font-size-complex="16pt"/>
    </style:style>
    <style:style style:name="P2" style:family="paragraph" style:parent-style-name="Standard">
      <style:paragraph-properties fo:margin-top="0.0402in" fo:margin-bottom="0.0598in" style:contextual-spacing="false" fo:line-height="115%" fo:text-align="center" style:justify-single-word="false"/>
      <style:text-properties fo:font-size="14pt" officeooo:rsid="001122f3" officeooo:paragraph-rsid="001122f3" style:font-size-asian="12.25pt" style:font-size-complex="14pt"/>
    </style:style>
    <style:style style:name="P3" style:family="paragraph" style:parent-style-name="Standard" style:list-style-name="L1">
      <style:paragraph-properties fo:margin-top="0.0402in" fo:margin-bottom="0.0598in" style:contextual-spacing="false" fo:line-height="115%" fo:text-align="left" style:justify-single-word="false"/>
      <style:text-properties fo:font-size="14pt" officeooo:rsid="001122f3" officeooo:paragraph-rsid="001122f3" style:font-size-asian="14pt" style:font-size-complex="14pt"/>
    </style:style>
    <style:style style:name="P4" style:family="paragraph" style:parent-style-name="Standard" style:list-style-name="L1">
      <style:paragraph-properties fo:margin-top="0.0402in" fo:margin-bottom="0.0598in" style:contextual-spacing="false" fo:line-height="115%" fo:text-align="left" style:justify-single-word="false"/>
      <style:text-properties fo:font-size="12pt" officeooo:rsid="001122f3" officeooo:paragraph-rsid="001122f3" style:font-size-asian="10.5pt" style:font-size-complex="12pt"/>
    </style:style>
    <style:style style:name="P5" style:family="paragraph" style:parent-style-name="Standard">
      <style:paragraph-properties fo:margin-top="0.0402in" fo:margin-bottom="0.0598in" style:contextual-spacing="false" fo:line-height="115%" fo:text-align="left" style:justify-single-word="false"/>
      <style:text-properties fo:font-size="12pt" officeooo:rsid="001122f3" officeooo:paragraph-rsid="001122f3" style:font-size-asian="10.5pt" style:font-size-complex="12pt"/>
    </style:style>
    <style:style style:name="P6" style:family="paragraph" style:parent-style-name="Standard" style:list-style-name="L1">
      <style:paragraph-properties fo:margin-top="0.0402in" fo:margin-bottom="0.0598in" style:contextual-spacing="false" fo:line-height="115%" fo:text-align="left" style:justify-single-word="false"/>
      <style:text-properties fo:font-size="14pt" officeooo:rsid="0012b26b" officeooo:paragraph-rsid="0012b26b" style:font-size-asian="12.25pt" style:font-size-complex="14pt"/>
    </style:style>
    <style:style style:name="P7" style:family="paragraph" style:parent-style-name="Standard" style:list-style-name="L1">
      <style:paragraph-properties fo:margin-top="0.0402in" fo:margin-bottom="0.0598in" style:contextual-spacing="false" fo:line-height="115%" fo:text-align="left" style:justify-single-word="false"/>
      <style:text-properties officeooo:rsid="0012b26b" officeooo:paragraph-rsid="0012b26b"/>
    </style:style>
    <style:style style:name="P8" style:family="paragraph" style:parent-style-name="Standard">
      <style:paragraph-properties fo:margin-top="0.0402in" fo:margin-bottom="0.0598in" style:contextual-spacing="false" fo:line-height="115%" fo:text-align="left" style:justify-single-word="false"/>
      <style:text-properties fo:font-size="12pt" officeooo:rsid="001480cc" officeooo:paragraph-rsid="0012b26b" style:font-size-asian="10.5pt" style:font-size-complex="12pt"/>
    </style:style>
    <style:style style:name="P9" style:family="paragraph" style:parent-style-name="Heading_20_4" style:list-style-name="L1">
      <style:paragraph-properties fo:margin-top="0.0402in" fo:margin-bottom="0.0598in" style:contextual-spacing="false" fo:line-height="115%" fo:text-align="left" style:justify-single-word="false"/>
      <style:text-properties fo:font-size="14pt" fo:font-weight="normal" officeooo:rsid="001480cc" officeooo:paragraph-rsid="0012b26b" style:font-size-asian="14pt" style:font-weight-asian="normal" style:font-size-complex="14pt" style:font-weight-complex="normal"/>
    </style:style>
    <style:style style:name="P10" style:family="paragraph" style:parent-style-name="Text_20_body" style:list-style-name="L1">
      <style:paragraph-properties fo:margin-top="0.0402in" fo:margin-bottom="0.0598in" style:contextual-spacing="false" fo:line-height="115%"/>
      <style:text-properties officeooo:rsid="001480cc"/>
    </style:style>
    <style:style style:name="P11" style:family="paragraph" style:parent-style-name="Text_20_body" style:list-style-name="L1">
      <style:paragraph-properties fo:margin-top="0.0402in" fo:margin-bottom="0.0598in" style:contextual-spacing="false" fo:line-height="115%"/>
      <style:text-properties officeooo:rsid="001480cc" officeooo:paragraph-rsid="001756bc"/>
    </style:style>
    <style:style style:name="P12" style:family="paragraph" style:parent-style-name="Text_20_body">
      <style:paragraph-properties fo:margin-top="0.0402in" fo:margin-bottom="0.0598in" style:contextual-spacing="false" fo:line-height="115%"/>
      <style:text-properties officeooo:rsid="001480cc"/>
    </style:style>
    <style:style style:name="P13" style:family="paragraph" style:parent-style-name="Heading_20_4" style:list-style-name="L1">
      <style:paragraph-properties fo:margin-top="0.0402in" fo:margin-bottom="0.0598in" style:contextual-spacing="false" fo:line-height="115%"/>
      <style:text-properties fo:font-size="14pt" fo:font-weight="normal" officeooo:rsid="001480cc" style:font-size-asian="14pt" style:font-weight-asian="normal" style:font-size-complex="14pt" style:font-weight-complex="normal"/>
    </style:style>
    <style:style style:name="P14" style:family="paragraph" style:parent-style-name="Heading_20_3" style:list-style-name="L1">
      <style:paragraph-properties fo:margin-top="0.0402in" fo:margin-bottom="0.0598in" style:contextual-spacing="false" fo:line-height="115%"/>
      <style:text-properties fo:font-weight="normal" officeooo:rsid="001480cc" style:font-weight-asian="normal" style:font-weight-complex="normal"/>
    </style:style>
    <style:style style:name="P15" style:family="paragraph" style:parent-style-name="Heading_20_4" style:list-style-name="L2">
      <style:paragraph-properties fo:margin-top="0.0402in" fo:margin-bottom="0.0598in" style:contextual-spacing="false" fo:line-height="115%"/>
      <style:text-properties fo:font-size="14pt" fo:font-weight="normal" officeooo:rsid="001480cc" style:font-size-asian="14pt" style:font-weight-asian="normal" style:font-size-complex="14pt" style:font-weight-complex="normal"/>
    </style:style>
    <style:style style:name="P16" style:family="paragraph" style:parent-style-name="Text_20_body" style:list-style-name="L2">
      <style:paragraph-properties fo:margin-top="0.0402in" fo:margin-bottom="0.0598in" style:contextual-spacing="false" fo:line-height="115%"/>
      <style:text-properties officeooo:rsid="001480cc"/>
    </style:style>
    <style:style style:name="P17" style:family="paragraph" style:parent-style-name="Heading_20_4" style:list-style-name="L3">
      <style:paragraph-properties fo:margin-top="0.0402in" fo:margin-bottom="0.0598in" style:contextual-spacing="false" fo:line-height="115%"/>
      <style:text-properties fo:font-size="14pt" fo:font-weight="normal" officeooo:rsid="001480cc" style:font-size-asian="14pt" style:font-weight-asian="normal" style:font-size-complex="14pt" style:font-weight-complex="normal"/>
    </style:style>
    <style:style style:name="P18" style:family="paragraph" style:parent-style-name="Text_20_body" style:list-style-name="L3">
      <style:paragraph-properties fo:margin-top="0.0402in" fo:margin-bottom="0.0598in" style:contextual-spacing="false" fo:line-height="115%"/>
      <style:text-properties officeooo:rsid="001480cc"/>
    </style:style>
    <style:style style:name="P19" style:family="paragraph" style:parent-style-name="Text_20_body" style:list-style-name="L4">
      <style:paragraph-properties fo:margin-top="0.0402in" fo:margin-bottom="0.0598in" style:contextual-spacing="false" fo:line-height="115%"/>
      <style:text-properties officeooo:rsid="001480cc"/>
    </style:style>
    <style:style style:name="P20" style:family="paragraph" style:parent-style-name="Text_20_body" style:list-style-name="L5">
      <style:paragraph-properties fo:margin-top="0.0402in" fo:margin-bottom="0.0598in" style:contextual-spacing="false" fo:line-height="115%"/>
      <style:text-properties officeooo:rsid="001480cc"/>
    </style:style>
    <style:style style:name="P21" style:family="paragraph" style:parent-style-name="Standard" style:list-style-name="L5">
      <style:paragraph-properties fo:margin-top="0.0402in" fo:margin-bottom="0.0598in" style:contextual-spacing="false" fo:line-height="115%" fo:text-align="left" style:justify-single-word="false"/>
      <style:text-properties fo:font-size="14pt" officeooo:rsid="001756bc" officeooo:paragraph-rsid="001756bc" style:font-size-asian="14pt" style:font-size-complex="14pt"/>
    </style:style>
    <style:style style:name="P22" style:family="paragraph" style:parent-style-name="Standard">
      <style:paragraph-properties fo:margin-top="0.0402in" fo:margin-bottom="0.0598in" style:contextual-spacing="false" fo:line-height="115%" fo:text-align="left" style:justify-single-word="false"/>
      <style:text-properties fo:font-size="14pt" officeooo:rsid="001756bc" officeooo:paragraph-rsid="001756bc" style:font-size-asian="14pt" style:font-size-complex="14pt"/>
    </style:style>
    <style:style style:name="P23" style:family="paragraph" style:parent-style-name="Standard" style:list-style-name="L5">
      <style:paragraph-properties fo:margin-top="0.0402in" fo:margin-bottom="0.0598in" style:contextual-spacing="false" fo:line-height="115%" fo:text-align="left" style:justify-single-word="false"/>
      <style:text-properties fo:font-size="12pt" officeooo:rsid="001756bc" officeooo:paragraph-rsid="001756bc" style:font-size-asian="12pt" style:font-size-complex="12pt"/>
    </style:style>
    <style:style style:name="P24" style:family="paragraph" style:parent-style-name="Standard" style:list-style-name="L5">
      <style:paragraph-properties fo:margin-top="0.0402in" fo:margin-bottom="0.0598in" style:contextual-spacing="false" fo:line-height="115%" fo:text-align="left" style:justify-single-word="false"/>
      <style:text-properties officeooo:paragraph-rsid="001756bc"/>
    </style:style>
    <style:style style:name="P25" style:family="paragraph" style:parent-style-name="Standard" style:list-style-name="L5">
      <style:paragraph-properties fo:margin-top="0.0402in" fo:margin-bottom="0.0598in" style:contextual-spacing="false" fo:line-height="115%" fo:text-align="left" style:justify-single-word="false"/>
      <style:text-properties officeooo:rsid="001756bc" officeooo:paragraph-rsid="001756bc"/>
    </style:style>
    <style:style style:name="P26" style:family="paragraph" style:parent-style-name="Standard" style:list-style-name="L5">
      <style:paragraph-properties fo:margin-top="0.0402in" fo:margin-bottom="0.0598in" style:contextual-spacing="false" fo:line-height="115%" fo:text-align="left" style:justify-single-word="false"/>
      <style:text-properties officeooo:rsid="0018a007" officeooo:paragraph-rsid="0018a007"/>
    </style:style>
    <style:style style:name="P27" style:family="paragraph" style:parent-style-name="Standard" style:list-style-name="L5">
      <style:paragraph-properties fo:margin-top="0.0402in" fo:margin-bottom="0.0598in" style:contextual-spacing="false" fo:line-height="115%" fo:text-align="left" style:justify-single-word="false" fo:break-before="page"/>
      <style:text-properties officeooo:rsid="0018a007" officeooo:paragraph-rsid="0018a007"/>
    </style:style>
    <style:style style:name="P28" style:family="paragraph" style:parent-style-name="Standard" style:list-style-name="L5">
      <style:paragraph-properties fo:margin-top="0.0402in" fo:margin-bottom="0.0598in" style:contextual-spacing="false" fo:line-height="115%" fo:text-align="left" style:justify-single-word="false"/>
      <style:text-properties officeooo:rsid="001d057b" officeooo:paragraph-rsid="001d057b"/>
    </style:style>
    <style:style style:name="P29" style:family="paragraph" style:parent-style-name="Standard" style:list-style-name="L5">
      <style:paragraph-properties fo:margin-top="0.0402in" fo:margin-bottom="0.0598in" style:contextual-spacing="false" fo:line-height="115%" fo:text-align="left" style:justify-single-word="false"/>
      <style:text-properties officeooo:rsid="001d9d8c" officeooo:paragraph-rsid="001d9d8c"/>
    </style:style>
    <style:style style:name="P30" style:family="paragraph" style:parent-style-name="Standard">
      <style:paragraph-properties fo:margin-top="0.0402in" fo:margin-bottom="0.0598in" style:contextual-spacing="false" fo:line-height="115%" fo:text-align="left" style:justify-single-word="false"/>
      <style:text-properties officeooo:rsid="001d9d8c" officeooo:paragraph-rsid="001d9d8c"/>
    </style:style>
    <style:style style:name="T1" style:family="text">
      <style:text-properties officeooo:rsid="0012b26b"/>
    </style:style>
    <style:style style:name="T2" style:family="text">
      <style:text-properties fo:font-size="12pt" style:font-size-asian="10.5pt" style:font-size-complex="12pt"/>
    </style:style>
    <style:style style:name="T3" style:family="text">
      <style:text-properties fo:font-size="12pt" fo:font-style="italic" style:font-size-asian="10.5pt" style:font-style-asian="italic" style:font-size-complex="12pt" style:font-style-complex="italic"/>
    </style:style>
    <style:style style:name="T4" style:family="text">
      <style:text-properties fo:font-size="12pt" officeooo:rsid="001480cc" style:font-size-asian="10.5pt" style:font-size-complex="12pt"/>
    </style:style>
    <style:style style:name="T5" style:family="text">
      <style:text-properties officeooo:rsid="0015c565"/>
    </style:style>
    <style:style style:name="T6" style:family="text">
      <style:text-properties officeooo:rsid="001756bc"/>
    </style:style>
    <style:style style:name="T7" style:family="text">
      <style:text-properties fo:font-weight="normal" officeooo:rsid="001756bc"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ize="12pt" officeooo:rsid="001756bc" style:font-size-asian="12pt" style:font-size-complex="12pt"/>
    </style:style>
    <style:style style:name="T11" style:family="text">
      <style:text-properties officeooo:rsid="0018a007"/>
    </style:style>
    <style:style style:name="T12" style:family="text">
      <style:text-properties officeooo:rsid="001fd68b"/>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kspertni sistem za optimizaciju menija i upravljanje osoboljem</text:p>
      <text:p text:style-name="P2"/>
      <text:list text:style-name="L1">
        <text:list-item>
          <text:p text:style-name="P3">Spisak članova:</text:p>
          <text:list>
            <text:list-item>
              <text:p text:style-name="P4">Filip Čonić</text:p>
            </text:list-item>
          </text:list>
        </text:list-item>
      </text:list>
      <text:p text:style-name="P5"/>
      <text:list text:continue-numbering="true" text:style-name="L1">
        <text:list-item>
          <text:p text:style-name="P3">Motivacija</text:p>
          <text:list>
            <text:list-item>
              <text:p text:style-name="P4">Lično interesovanje i razumevanje teme. Mnogi restorani imaju izazove vezane za profitabilnost i sa isplaćivanjem broja zaposlenog osoblja. Odluke se donose intuitivno, bez preterane obrade podataka. Jela koja ne stvaraju veliki profit ostaju na meniju jer su kuvari ili vlasnici vezani zaideju tog jela i umesto da se poboljša na neki način ili zameni, ono ostaje nepromenjeno. Takođe dolazi do toga da se ne može ispratiti produktivnost osoblja, nego se <text:span text:style-name="T1">produktivnost procenjuje po bliskošću sa ostatkom osoblja i slično. Cilj ovog projekta je da centralizuje informacije i nagovesti vlasniku ili menadžeru kako treba da donose odluke.</text:span></text:p>
            </text:list-item>
          </text:list>
        </text:list-item>
      </text:list>
      <text:p text:style-name="P5"/>
      <text:list text:continue-numbering="true" text:style-name="L1">
        <text:list-item>
          <text:p text:style-name="P6">Pregled problema</text:p>
          <text:list>
            <text:list-item>
              <text:p text:style-name="P7"><text:span text:style-name="T2">Problem upravljanja restoranom je komplikovan jer sadrži mnogo mogućih ulaza koji se trebaju grupisati radi smanjivanja dimenzionalnosti problema. Postojeća rešenja su uglavnom u obliku </text:span><text:span text:style-name="T3">Point of Sale</text:span><text:span text:style-name="T2"> sistema, gde su najpoznatiji </text:span><text:span text:style-name="T3">Square for Restaurants</text:span><text:span text:style-name="T2"> i </text:span><text:span text:style-name="T3">Toast POS</text:span><text:span text:style-name="T2">. Oni prikupljaju podatke i olakšavaju taj deo posla, ali ne donose nikakve inteligentne odluke. Oni proizvode izveštaje na osnovu kojih bi vlasnik mogao doneti odluku. Sa brojem stavki koje su moge pronaći na izveštajima ljudsko biće ne može doneti nikakve odluke. Zbog je potebno uvesti Rule-Based Engine </text:span><text:span text:style-name="T4">koji može obrađivati podatke i donositi inteligentne odluke.</text:span></text:p>
            </text:list-item>
          </text:list>
        </text:list-item>
      </text:list>
      <text:p text:style-name="P8"/>
      <text:list text:continue-numbering="true" text:style-name="L1">
        <text:list-item>
          <text:h text:style-name="P9" text:outline-level="4">Ulazi u sistem</text:h>
          <text:list>
            <text:list-item>
              <text:p text:style-name="P10">Podaci o jelima: naziv, kategorija, cena, trošak pripreme, <text:span text:style-name="T5">nedeljna</text:span> prodaja, <text:span text:style-name="T5">sezona</text:span></text:p>
            </text:list-item>
            <text:list-item>
              <text:p text:style-name="P11">Podaci o konobarima: ime, broj opsluženih stolova po sm<text:span text:style-name="T5">e</text:span>ni, prosečna vrednost <text:span text:style-name="T6">p</text:span><text:span text:style-name="Strong_20_Emphasis"><text:span text:style-name="T7">orudžbine</text:span></text:span>, ocene gostiju </text:p>
            </text:list-item>
            <text:list-item>
              <text:p text:style-name="P10">Podaci o smenama: datum, konobar, broj gostiju, ukupna zarada smene </text:p>
            </text:list-item>
            <text:list-item>
              <text:p text:style-name="P10">Podaci o transakcijama: narudžb<text:span text:style-name="T5">in</text:span>e po stolu, jela, konobari koji su ih opslužili</text:p>
            </text:list-item>
          </text:list>
        </text:list-item>
      </text:list>
      <text:p text:style-name="P12"/>
      <text:list text:continue-numbering="true" text:style-name="L1">
        <text:list-item>
          <text:h text:style-name="P13" text:outline-level="4"><text:soft-page-break/>Izlazi iz sistema</text:h>
          <text:list>
            <text:list-item>
              <text:p text:style-name="P10">Preporuke za meni: ukloni jelo / promeni cenu / pokreni promociju / dodaj novo jelo </text:p>
            </text:list-item>
            <text:list-item>
              <text:p text:style-name="P10">Preporuke za osoblje: upozorenje / dodatna obuka / nagrada / preraspoređivanje po sm<text:span text:style-name="T5">e</text:span>nama </text:p>
            </text:list-item>
            <text:list-item>
              <text:p text:style-name="P10">CEP upozorenja u realnom vremenu: nagli pad prodaje određenog jela, neobičan obrazac narudžbi, pad produktivnosti konobara tokom smjene </text:p>
            </text:list-item>
            <text:list-item>
              <text:p text:style-name="P10">Izveštaj sa obrazloženjem za svaku preporuku</text:p>
            </text:list-item>
          </text:list>
        </text:list-item>
      </text:list>
      <text:p text:style-name="P12"/>
      <text:list text:continue-numbering="true" text:style-name="L1">
        <text:list-item>
          <text:h text:style-name="P14" text:outline-level="3">Baza znanja</text:h>
          <text:list>
            <text:list-item>
              <text:p text:style-name="P10">Baza znanja sistema sastoji se od tri komponente: <text:span text:style-name="Strong_20_Emphasis"><text:span text:style-name="T8">entiteta</text:span></text:span>, <text:span text:style-name="Strong_20_Emphasis"><text:span text:style-name="T8">činjenica</text:span></text:span> i <text:span text:style-name="Strong_20_Emphasis"><text:span text:style-name="T8">izvedenih</text:span></text:span><text:span text:style-name="Strong_20_Emphasis"><text:span text:style-name="T9"> </text:span></text:span><text:span text:style-name="Strong_20_Emphasis"><text:span text:style-name="T8">činjenica</text:span></text:span>.</text:p>
            </text:list-item>
          </text:list>
        </text:list-item>
      </text:list>
      <text:list text:style-name="L2">
        <text:list-item>
          <text:h text:style-name="P15" text:outline-level="4">Entiteti</text:h>
          <text:list>
            <text:list-item>
              <text:p text:style-name="P16"><text:span text:style-name="Strong_20_Emphasis"><text:span text:style-name="T8">Jelo</text:span></text:span><text:span text:style-name="T9"> </text:span>predstavlja osnovnu stavku menija i sadrži naziv, kategoriju (predjelo, glavno jelo, desert, piće), prodajnu cijenu, trošak pripreme i prosečnu <text:span text:style-name="T6">nedeljnu</text:span> prodaju.</text:p>
            </text:list-item>
            <text:list-item>
              <text:p text:style-name="P16"><text:span text:style-name="Strong_20_Emphasis"><text:span text:style-name="T8">Konobar</text:span></text:span><text:span text:style-name="T9"> </text:span>predstavlja zaposlenog u sali i karakteriše ga ime, prosečan broj opsluženih stolova po smeni, pros<text:span text:style-name="T6">e</text:span>čna vrednost narudžbe koju ostvari i prosečna ocena od strane gostiju.</text:p>
            </text:list-item>
            <text:list-item>
              <text:p text:style-name="P16"><text:span text:style-name="Strong_20_Emphasis"><text:span text:style-name="T8">Smena</text:span></text:span><text:span text:style-name="T9"> </text:span>predstavlja jedan radni period i vezana je za konkretnog konobara. Sadrži datum, broj gostiju koje je konobar opslužio i ukupnu zaradu ostvarenu tokom te smene.</text:p>
            </text:list-item>
            <text:list-item>
              <text:p text:style-name="P16"><text:span text:style-name="Strong_20_Emphasis"><text:span text:style-name="T7">Porudžbina</text:span></text:span><text:span text:style-name="T9"> </text:span>predstavlja pojedinačnu transakciju i vezana je za sto, konobara i listu naručenih jela, sa datumom i vremenom kreiranja.</text:p>
            </text:list-item>
          </text:list>
        </text:list-item>
      </text:list>
      <text:list xml:id="list1178330693" text:style-name="L3">
        <text:list-item>
          <text:h text:style-name="P17" text:outline-level="4">Činjenice</text:h>
          <text:list>
            <text:list-item>
              <text:p text:style-name="P18">Činjenice su konkretni podaci koji se unose u sistem i čine polaznu osnovu za zaključivanje. Popunjavaju se na dva načina - ručnim unosom od strane menadžera kroz interfejs i automatski iz POS sistema na kraju svake smjene.</text:p>
            </text:list-item>
            <text:list-item>
              <text:p text:style-name="P18">Konkretne činjenice koje sistem koristi su:</text:p>
            </text:list-item>
          </text:list>
        </text:list-item>
      </text:list>
      <text:list text:style-name="L4">
        <text:list-item>
          <text:list>
            <text:list-item>
              <text:list>
                <text:list-item>
                  <text:p text:style-name="P19">Naziv, kategorija, cena i trošak pripreme za svako jelo na meniju </text:p>
                </text:list-item>
                <text:list-item>
                  <text:p text:style-name="P19"><text:span text:style-name="T6">Nedeljna</text:span> prodaja po jelu (koliko komada je prodato) </text:p>
                </text:list-item>
                <text:list-item>
                  <text:p text:style-name="P19">Za svakog konobara: broj stolova po smeni, prosečna vrednost <text:span text:style-name="T6">porudžbine</text:span> i ocena gostiju </text:p>
                </text:list-item>
                <text:list-item>
                  <text:p text:style-name="P19">Za svaku smenu: datum, konobar, broj gostiju i ukupna zarada </text:p>
                </text:list-item>
                <text:list-item>
                  <text:p text:style-name="P19">Evidencija reklamacija i storniranja narudžbi po konobaru i jelu </text:p>
                </text:list-item>
              </text:list>
            </text:list-item>
          </text:list>
        </text:list-item>
      </text:list>
      <text:list text:continue-list="list1178330693" text:style-name="L3">
        <text:list-item>
          <text:h text:style-name="P17" text:outline-level="4"><text:soft-page-break/>Izvedene činjenice</text:h>
          <text:list>
            <text:list-item>
              <text:p text:style-name="P18">Izvedene činjenice nisu direktno unesene, već ih sistem sam zaključuje primjenom pravila na postojeće činjenice. Tokom rada sistema izvode se sljedeće činjenice:</text:p>
            </text:list-item>
          </text:list>
        </text:list-item>
      </text:list>
      <text:list text:style-name="L5">
        <text:list-item>
          <text:list>
            <text:list-item>
              <text:list>
                <text:list-item>
                  <text:p text:style-name="P20"><text:span text:style-name="Strong_20_Emphasis"><text:span text:style-name="T8">Profit margin jela</text:span></text:span><text:span text:style-name="T8"> - izračunava se iz prodajne cijene i troška pripreme </text:span></text:p>
                </text:list-item>
                <text:list-item>
                  <text:p text:style-name="P20"><text:span text:style-name="Strong_20_Emphasis"><text:span text:style-name="T8">Bestseller status jela</text:span></text:span><text:span text:style-name="T8"> - izvodi se ako </text:span><text:span text:style-name="T7">nedeljna</text:span><text:span text:style-name="T8"> prodaja prelazi definisani prag </text:span></text:p>
                </text:list-item>
                <text:list-item>
                  <text:p text:style-name="P20"><text:span text:style-name="Strong_20_Emphasis"><text:span text:style-name="T8">Efikasnost konobara</text:span></text:span><text:span text:style-name="T8"> - izvodi se na osnovu broja stolova i ocjene gostiju </text:span></text:p>
                </text:list-item>
                <text:list-item>
                  <text:p text:style-name="P20"><text:span text:style-name="Strong_20_Emphasis"><text:span text:style-name="T8">Zarada po gostu po smeni</text:span></text:span><text:span text:style-name="T8"> - izvodi se deljenjem ukupne zarade sa brojem gostiju </text:span></text:p>
                </text:list-item>
                <text:list-item>
                  <text:p text:style-name="P20"><text:span text:style-name="Strong_20_Emphasis"><text:span text:style-name="T8">Neisplativost jela</text:span></text:span><text:span text:style-name="T8"> - izvodi se ako su profit margin i </text:span><text:span text:style-name="T7">nedeljna</text:span><text:span text:style-name="T8"> prodaja ispod pragova </text:span></text:p>
                </text:list-item>
                <text:list-item>
                  <text:p text:style-name="P20"><text:span text:style-name="Strong_20_Emphasis"><text:span text:style-name="T8">Potencijal jela</text:span></text:span><text:span text:style-name="T8"> - izvodi se ako jelo ima visok margin ali nisku prodaju </text:span></text:p>
                </text:list-item>
                <text:list-item>
                  <text:p text:style-name="P20"><text:span text:style-name="Strong_20_Emphasis"><text:span text:style-name="T8">Problematičan konobar</text:span></text:span><text:span text:style-name="T8"> - izvodi se ako konobar nije efikasan i ima nisku ocenu </text:span></text:p>
                </text:list-item>
                <text:list-item>
                  <text:p text:style-name="P20"><text:span text:style-name="Strong_20_Emphasis"><text:span text:style-name="T8">Loša smena</text:span></text:span><text:span text:style-name="T8"> - izvodi se ako je zarada po gostu znatno ispod proseka </text:span></text:p>
                </text:list-item>
                <text:list-item>
                  <text:p text:style-name="P20"><text:span text:style-name="Strong_20_Emphasis"><text:span text:style-name="T8">Konzistentno loš konobar</text:span></text:span><text:span text:style-name="T8"> - izvodi se akumulacijom loših smjena u zadnj</text:span><text:span text:style-name="T7">e dve nedelje</text:span></text:p>
                </text:list-item>
              </text:list>
            </text:list-item>
          </text:list>
        </text:list-item>
      </text:list>
      <text:p text:style-name="P12"/>
      <text:list text:continue-numbering="true" text:style-name="L5">
        <text:list-item>
          <text:p text:style-name="P21">Primer rezonovanja</text:p>
        </text:list-item>
      </text:list>
      <text:p text:style-name="P22"/>
      <text:list text:continue-numbering="true" text:style-name="L5">
        <text:list-item>
          <text:list>
            <text:list-item>
              <text:p text:style-name="P23">Menadžer restorana pokreće sistem na kraju radne sedmice. U sistem su unešeni podaci za proteklih 7 dana. Sistem treba da donese preporuke vezane za meni i osoblje.</text:p>
            </text:list-item>
            <text:list-item>
              <text:p text:style-name="P24"><text:span text:style-name="T10">Ulaz: </text:span>Jelo <text:span text:style-name="Strong_20_Emphasis"><text:span text:style-name="T8">riblja čorba</text:span></text:span>: cena 500 din, trošak pripreme 280 din, prodaja 12 komada <text:span text:style-name="T6">nedeljno</text:span></text:p>
            </text:list-item>
            <text:list-item>
              <text:p text:style-name="P25">Korak 1 – Osnovne metrike: Iz cene jela i troška pripreme izračunava se profit margin, koji će u slučaju riblje čorbe biti (500 – 280) / 500 = 44%</text:p>
            </text:list-item>
            <text:list-item>
              <text:p text:style-name="P25">Korak 2 – Klasifikacija na osnovu metrike: <text:span text:style-name="T11">Ako je potrebno da bi jelo bilo isplativo da ima preko 20 prodatih i da ima profit margin preko 20%, riblja čorba bi se odredila kao neisplativa</text:span></text:p>
            </text:list-item>
            <text:list-item>
              <text:p text:style-name="P26">Korak 3 – Generisanje preporuka: U odnosu na šta je izračunato u prethodnim koracima sistem proizvodi ljduski čitljivu poruku kao “Riblja čorba je neisplativa potrebno ju je ukloniti sa menija”</text:p>
            </text:list-item>
            <text:list-item>
              <text:p text:style-name="P26">Izlaz: Poruka za menadžera: “Riblja čorba je neisplativa potrebno ju je ukloniti sa menija”</text:p>
              <text:p text:style-name="P26"/>
            </text:list-item>
          </text:list>
          <text:p text:style-name="P27"/>
        </text:list-item>
        <text:list-item>
          <text:p text:style-name="P26">Nivo 1: Osnovne metrike</text:p>
          <text:list>
            <text:list-item>
              <text:p text:style-name="P26">IF jelo ima cenu &gt; 0 i trošak pripreme THEN izračunaj profit margin = <draw:frame draw:style-name="fr1" draw:name="Object1" text:anchor-type="as-char" svg:y="-0.2264in" svg:width="0.9217in" svg:height="0.3591in" draw:z-index="0"><draw:object xlink:href="./Object 1" xlink:type="simple" xlink:show="embed" xlink:actuate="onLoad"/><draw:image xlink:href="./ObjectReplacements/Object 1" xlink:type="simple" xlink:show="embed" xlink:actuate="onLoad"/></draw:frame></text:p>
            </text:list-item>
            <text:list-item>
              <text:p text:style-name="P26">IF smena ima broj gostiju &gt; 0 THEN izračunaj zaradu po gostu = <draw:frame draw:style-name="fr1" draw:name="Object2" text:anchor-type="as-char" svg:y="-0.2264in" svg:width="1.022in" svg:height="0.3591in" draw:z-index="1"><draw:object xlink:href="./Object 2" xlink:type="simple" xlink:show="embed" xlink:actuate="onLoad"/><draw:image xlink:href="./ObjectReplacements/Object 2" xlink:type="simple" xlink:show="embed" xlink:actuate="onLoad"/></draw:frame></text:p>
            </text:list-item>
          </text:list>
        </text:list-item>
        <text:list-item>
          <text:p text:style-name="P28">Nivo 2: Klasifikacija</text:p>
          <text:list>
            <text:list-item>
              <text:p text:style-name="P28">Klasifikacija jela</text:p>
              <text:list>
                <text:list-item>
                  <text:p text:style-name="P28">IF profit margin jela ≥ 0.20 AND nedeljna prodaja ≥ 20 THEN jelo je isplativo</text:p>
                </text:list-item>
                <text:list-item>
                  <text:p text:style-name="P28">IF nedeljna prodaja ≥ 30 THEN jelo je bestseller</text:p>
                </text:list-item>
                <text:list-item>
                  <text:p text:style-name="P28">IF profit margin jela &lt; 0.20 AND nedeljna prodaja &lt; 20 THEN jelo je neisplativo</text:p>
                </text:list-item>
                <text:list-item>
                  <text:p text:style-name="P28">IF profit margin jela &gt; 0.40 AND nedeljna prodaja &lt; 15 THEN jelo ima visok potencijal</text:p>
                </text:list-item>
              </text:list>
            </text:list-item>
            <text:list-item>
              <text:p text:style-name="P28">Klasifikacija smene:</text:p>
              <text:list>
                <text:list-item>
                  <text:p text:style-name="P28">IF zarada po gostu smene &lt; 70% prosečne zarade po gostu svih smena THEN smena je loša</text:p>
                </text:list-item>
                <text:list-item>
                  <text:p text:style-name="P28">IF zarada po gostu smene &gt; 120% prosečne zarade po gostu svih smena THEN smena je dobra</text:p>
                </text:list-item>
              </text:list>
            </text:list-item>
            <text:list-item>
              <text:p text:style-name="P28">Klasifikacija konobara</text:p>
              <text:list>
                <text:list-item>
                  <text:p text:style-name="P28">IF konobar ima ocenu gostiju &lt; 3.0 AND prosečan broj stolova po smeni &lt; 5 THEN konobar je problematičan</text:p>
                </text:list-item>
                <text:list-item>
                  <text:p text:style-name="P28">IF konobar ima ocenu gostiju ≥ 4.5 AND prosečan broj stolova po smeni ≥ 8 THEN konobar je odličan</text:p>
                </text:list-item>
              </text:list>
            </text:list-item>
          </text:list>
        </text:list-item>
        <text:list-item>
          <text:p text:style-name="P29">Nivo 3: Izvedene klasifikacije</text:p>
          <text:list>
            <text:list-item>
              <text:p text:style-name="P29">Klasifikacija jela:</text:p>
              <text:list>
                <text:list-item>
                  <text:p text:style-name="P29">IF jelo je neisplativo AND jelo je bestseller THEN jelo je problematično za cenu</text:p>
                </text:list-item>
              </text:list>
            </text:list-item>
            <text:list-item>
              <text:p text:style-name="P29">Klasifikacija konobara:</text:p>
              <text:list>
                <text:list-item>
                  <text:p text:style-name="P29">IF konobar radi u≥6 loših smena u poslednjih 14 dana THEN konobar je konzistentno loš</text:p>
                </text:list-item>
                <text:list-item>
                  <text:p text:style-name="P29">IF konobar radi u ≥ 6 dobre smene u poslednjih 14 dana THEN konobar je konzistentno dobar</text:p>
                </text:list-item>
              </text:list>
            </text:list-item>
          </text:list>
          <text:p text:style-name="P29"/>
        </text:list-item>
        <text:list-item>
          <text:p text:style-name="P29"><text:soft-page-break/>Nivo 4: Preporuke</text:p>
          <text:list>
            <text:list-item>
              <text:p text:style-name="P29">Za jela</text:p>
              <text:list>
                <text:list-item>
                  <text:p text:style-name="P29">IF jelo je neisplativo AND NOT problematično za cenu THEN preporuka: ukloni jelo</text:p>
                </text:list-item>
                <text:list-item>
                  <text:p text:style-name="P29">IF jelo je problematično za cenu THEN preporuka: promeni cenu</text:p>
                </text:list-item>
                <text:list-item>
                  <text:p text:style-name="P29">IF jelo ima visok potencijal THEN preporuka: pokreni promociju</text:p>
                </text:list-item>
                <text:list-item>
                  <text:p text:style-name="P29">IF <text:span text:style-name="T12">kategorija jela </text:span>nema nijednog jela koji je bestseller THEN preporuka: dodaj novo jelo</text:p>
                </text:list-item>
              </text:list>
            </text:list-item>
            <text:list-item>
              <text:p text:style-name="P29">Za konobara</text:p>
              <text:list>
                <text:list-item>
                  <text:p text:style-name="P29">IF konobar je problematičan AND nije konzistentno loš THEN preporuka: upozorenje</text:p>
                </text:list-item>
                <text:list-item>
                  <text:p text:style-name="P29">IF konobar je konzistentno loš THEN preporuka: dodatna obuka</text:p>
                </text:list-item>
                <text:list-item>
                  <text:p text:style-name="P29">IF konobar je konzistentno dobar THEN preporuka: nagrada</text:p>
                </text:list-item>
              </text:list>
            </text:list-item>
          </text:list>
        </text:list-item>
      </text:list>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Nimbus Roman" fo:font-family="'Nimbus Roman'" style:font-family-generic="roman" style:font-pitch="variable" fo:font-size="12pt" fo:font-weight="bold" style:font-name-asian="Nimbus Sans1" style:font-family-asian="'Nimbus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Nimbus Roman" fo:font-family="'Nimbus Roman'" style:font-family-generic="roman" style:font-pitch="variable" fo:font-size="14pt" fo:font-weight="bold" style:font-name-asian="Nimbus Sans1" style:font-family-asian="'Nimbus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09:12:44.190424025</meta:creation-date>
    <dc:date>2026-05-28T04:45:30.620708729</dc:date>
    <meta:editing-duration>PT13H55M10S</meta:editing-duration>
    <meta:editing-cycles>5</meta:editing-cycles>
    <meta:generator>LibreOffice/26.2.3.2$Linux_X86_64 LibreOffice_project/620$Build-2</meta:generator>
    <meta:document-statistic meta:table-count="0" meta:image-count="0" meta:object-count="2" meta:page-count="5" meta:paragraph-count="84" meta:word-count="1184" meta:character-count="7048" meta:non-whitespace-character-count="6004"/>
  </office:meta>
</office:document-meta>
</file>

<file path=Object 1/content.xml><?xml version="1.0" encoding="utf-8"?>
<math xmlns="http://www.w3.org/1998/Math/MathML" display="block">
  <semantics>
    <mfrac>
      <mrow>
        <mi mathvariant="italic">cena</mi>
        <mo stretchy="false">−</mo>
        <mi mathvariant="italic">trošak</mi>
      </mrow>
      <mi mathvariant="italic">cena</mi>
    </mfrac>
    <annotation encoding="StarMath 5.0">{cena - trošak} over {cena} </annotation>
  </semantics>
</math>
</file>

<file path=Object 2/content.xml><?xml version="1.0" encoding="utf-8"?>
<math xmlns="http://www.w3.org/1998/Math/MathML" display="block">
  <semantics>
    <mfrac>
      <mrow>
        <mi mathvariant="italic">ukupna</mi>
        <mi mathvariant="italic">zarada</mi>
      </mrow>
      <mrow>
        <mi mathvariant="italic">broj</mi>
        <mi mathvariant="italic">gostiju</mi>
      </mrow>
    </mfrac>
    <annotation encoding="StarMath 5.0">{ukupna zarada} over {broj gostiju} </annotation>
  </semantics>
</math>
</file>