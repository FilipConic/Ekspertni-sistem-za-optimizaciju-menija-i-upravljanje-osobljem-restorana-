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Nimbus Mono PS" svg:font-family="'Nimbus Mono PS'" style:font-family-generic="modern" style:font-pitch="fixed"/>
    <style:font-face style:name="Nimbus Roman" svg:font-family="'Nimbus Roman'" style:font-pitch="variable"/>
    <style:font-face style:name="Nimbus Roman1"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0402in" fo:margin-bottom="0.0598in" style:contextual-spacing="false" fo:line-height="115%" fo:text-align="center" style:justify-single-word="false"/>
      <style:text-properties fo:font-size="16pt" officeooo:rsid="001122f3" officeooo:paragraph-rsid="001122f3" style:font-size-asian="16pt" style:font-size-complex="16pt"/>
    </style:style>
    <style:style style:name="P2" style:family="paragraph" style:parent-style-name="Standard">
      <style:paragraph-properties fo:margin-top="0.0402in" fo:margin-bottom="0.0598in" style:contextual-spacing="false" fo:line-height="115%" fo:text-align="center" style:justify-single-word="false"/>
      <style:text-properties fo:font-size="14pt" officeooo:rsid="001122f3" officeooo:paragraph-rsid="001122f3" style:font-size-asian="12.25pt" style:font-size-complex="14pt"/>
    </style:style>
    <style:style style:name="P3" style:family="paragraph" style:parent-style-name="Standard" style:list-style-name="L1">
      <style:paragraph-properties fo:margin-top="0.0402in" fo:margin-bottom="0.0598in" style:contextual-spacing="false" fo:line-height="115%" fo:text-align="left" style:justify-single-word="false"/>
      <style:text-properties fo:font-size="14pt" officeooo:rsid="001122f3" officeooo:paragraph-rsid="001122f3" style:font-size-asian="14pt" style:font-size-complex="14pt"/>
    </style:style>
    <style:style style:name="P4" style:family="paragraph" style:parent-style-name="Standard" style:list-style-name="L1">
      <style:paragraph-properties fo:margin-top="0.0402in" fo:margin-bottom="0.0598in" style:contextual-spacing="false" fo:line-height="115%" fo:text-align="left" style:justify-single-word="false"/>
      <style:text-properties fo:font-size="12pt" officeooo:rsid="001122f3" officeooo:paragraph-rsid="001122f3" style:font-size-asian="10.5pt" style:font-size-complex="12pt"/>
    </style:style>
    <style:style style:name="P5" style:family="paragraph" style:parent-style-name="Standard">
      <style:paragraph-properties fo:margin-top="0.0402in" fo:margin-bottom="0.0598in" style:contextual-spacing="false" fo:line-height="115%" fo:text-align="left" style:justify-single-word="false"/>
      <style:text-properties fo:font-size="12pt" officeooo:rsid="001122f3" officeooo:paragraph-rsid="001122f3" style:font-size-asian="10.5pt" style:font-size-complex="12pt"/>
    </style:style>
    <style:style style:name="P6" style:family="paragraph" style:parent-style-name="Standard" style:list-style-name="L1">
      <style:paragraph-properties fo:margin-top="0.0402in" fo:margin-bottom="0.0598in" style:contextual-spacing="false" fo:line-height="115%" fo:text-align="left" style:justify-single-word="false"/>
      <style:text-properties fo:font-size="14pt" officeooo:rsid="0012b26b" officeooo:paragraph-rsid="0012b26b" style:font-size-asian="12.25pt" style:font-size-complex="14pt"/>
    </style:style>
    <style:style style:name="P7" style:family="paragraph" style:parent-style-name="Standard" style:list-style-name="L1">
      <style:paragraph-properties fo:margin-top="0.0402in" fo:margin-bottom="0.0598in" style:contextual-spacing="false" fo:line-height="115%" fo:text-align="left" style:justify-single-word="false"/>
      <style:text-properties officeooo:rsid="0012b26b" officeooo:paragraph-rsid="0012b26b"/>
    </style:style>
    <style:style style:name="P8" style:family="paragraph" style:parent-style-name="Standard">
      <style:paragraph-properties fo:margin-top="0.0402in" fo:margin-bottom="0.0598in" style:contextual-spacing="false" fo:line-height="115%" fo:text-align="left" style:justify-single-word="false"/>
      <style:text-properties fo:font-size="12pt" officeooo:rsid="001480cc" officeooo:paragraph-rsid="0012b26b" style:font-size-asian="10.5pt" style:font-size-complex="12pt"/>
    </style:style>
    <style:style style:name="P9" style:family="paragraph" style:parent-style-name="Heading_20_4" style:list-style-name="L1">
      <style:paragraph-properties fo:margin-top="0.0402in" fo:margin-bottom="0.0598in" style:contextual-spacing="false" fo:line-height="115%" fo:text-align="left" style:justify-single-word="false"/>
      <style:text-properties fo:font-size="14pt" fo:font-weight="normal" officeooo:rsid="001480cc" officeooo:paragraph-rsid="0012b26b" style:font-size-asian="14pt" style:font-weight-asian="normal" style:font-size-complex="14pt" style:font-weight-complex="normal"/>
    </style:style>
    <style:style style:name="P10" style:family="paragraph" style:parent-style-name="Text_20_body" style:list-style-name="L1">
      <style:paragraph-properties fo:margin-top="0.0402in" fo:margin-bottom="0.0598in" style:contextual-spacing="false" fo:line-height="115%"/>
      <style:text-properties officeooo:rsid="001480cc"/>
    </style:style>
    <style:style style:name="P11" style:family="paragraph" style:parent-style-name="Text_20_body" style:list-style-name="L1">
      <style:paragraph-properties fo:margin-top="0.0402in" fo:margin-bottom="0.0598in" style:contextual-spacing="false" fo:line-height="115%"/>
      <style:text-properties officeooo:rsid="001480cc" officeooo:paragraph-rsid="001756bc"/>
    </style:style>
    <style:style style:name="P12" style:family="paragraph" style:parent-style-name="Text_20_body">
      <style:paragraph-properties fo:margin-top="0.0402in" fo:margin-bottom="0.0598in" style:contextual-spacing="false" fo:line-height="115%"/>
      <style:text-properties officeooo:rsid="001480cc"/>
    </style:style>
    <style:style style:name="P13" style:family="paragraph" style:parent-style-name="Heading_20_4" style:list-style-name="L1">
      <style:paragraph-properties fo:margin-top="0.0402in" fo:margin-bottom="0.0598in" style:contextual-spacing="false" fo:line-height="115%"/>
      <style:text-properties fo:font-size="14pt" fo:font-weight="normal" officeooo:rsid="001480cc" style:font-size-asian="14pt" style:font-weight-asian="normal" style:font-size-complex="14pt" style:font-weight-complex="normal"/>
    </style:style>
    <style:style style:name="P14" style:family="paragraph" style:parent-style-name="Heading_20_3" style:list-style-name="L1">
      <style:paragraph-properties fo:margin-top="0.0402in" fo:margin-bottom="0.0598in" style:contextual-spacing="false" fo:line-height="115%"/>
      <style:text-properties fo:font-weight="normal" officeooo:rsid="001480cc" style:font-weight-asian="normal" style:font-weight-complex="normal"/>
    </style:style>
    <style:style style:name="P15" style:family="paragraph" style:parent-style-name="Heading_20_4" style:list-style-name="L2">
      <style:paragraph-properties fo:margin-top="0.0402in" fo:margin-bottom="0.0598in" style:contextual-spacing="false" fo:line-height="115%"/>
      <style:text-properties fo:font-size="14pt" fo:font-weight="normal" officeooo:rsid="001480cc" style:font-size-asian="14pt" style:font-weight-asian="normal" style:font-size-complex="14pt" style:font-weight-complex="normal"/>
    </style:style>
    <style:style style:name="P16" style:family="paragraph" style:parent-style-name="Text_20_body" style:list-style-name="L2">
      <style:paragraph-properties fo:margin-top="0.0402in" fo:margin-bottom="0.0598in" style:contextual-spacing="false" fo:line-height="115%"/>
      <style:text-properties officeooo:rsid="001480cc"/>
    </style:style>
    <style:style style:name="P17" style:family="paragraph" style:parent-style-name="Heading_20_4" style:list-style-name="L3">
      <style:paragraph-properties fo:margin-top="0.0402in" fo:margin-bottom="0.0598in" style:contextual-spacing="false" fo:line-height="115%"/>
      <style:text-properties fo:font-size="14pt" fo:font-weight="normal" officeooo:rsid="001480cc" style:font-size-asian="14pt" style:font-weight-asian="normal" style:font-size-complex="14pt" style:font-weight-complex="normal"/>
    </style:style>
    <style:style style:name="P18" style:family="paragraph" style:parent-style-name="Text_20_body" style:list-style-name="L3">
      <style:paragraph-properties fo:margin-top="0.0402in" fo:margin-bottom="0.0598in" style:contextual-spacing="false" fo:line-height="115%"/>
      <style:text-properties officeooo:rsid="001480cc"/>
    </style:style>
    <style:style style:name="P19" style:family="paragraph" style:parent-style-name="Text_20_body" style:list-style-name="L4">
      <style:paragraph-properties fo:margin-top="0.0402in" fo:margin-bottom="0.0598in" style:contextual-spacing="false" fo:line-height="115%"/>
      <style:text-properties officeooo:rsid="001480cc"/>
    </style:style>
    <style:style style:name="P20" style:family="paragraph" style:parent-style-name="Text_20_body" style:list-style-name="L5">
      <style:paragraph-properties fo:margin-top="0.0402in" fo:margin-bottom="0.0598in" style:contextual-spacing="false" fo:line-height="115%"/>
      <style:text-properties officeooo:rsid="001480cc"/>
    </style:style>
    <style:style style:name="P21" style:family="paragraph" style:parent-style-name="Text_20_body">
      <style:paragraph-properties fo:margin-top="0.0402in" fo:margin-bottom="0.0598in" style:contextual-spacing="false" fo:line-height="115%"/>
      <style:text-properties officeooo:rsid="001d9d8c"/>
    </style:style>
    <style:style style:name="P22" style:family="paragraph" style:parent-style-name="Heading_20_2">
      <style:paragraph-properties fo:margin-left="0in" fo:margin-right="0in" fo:margin-top="0.0402in" fo:margin-bottom="0.0598in" style:contextual-spacing="false" fo:line-height="115%" fo:orphans="1" fo:text-indent="0in" style:auto-text-indent="false"/>
      <style:text-properties style:font-name="Nimbus Roman" officeooo:rsid="001d9d8c"/>
    </style:style>
    <style:style style:name="P23" style:family="paragraph" style:parent-style-name="Text_20_body">
      <style:paragraph-properties fo:margin-top="0.0402in" fo:margin-bottom="0.0598in" style:contextual-spacing="false" fo:orphans="1"/>
      <style:text-properties style:font-name="Nimbus Roman" officeooo:rsid="001d9d8c"/>
    </style:style>
    <style:style style:name="P24" style:family="paragraph" style:parent-style-name="Text_20_body">
      <style:paragraph-properties fo:margin-top="0.0402in" fo:margin-bottom="0.0598in" style:contextual-spacing="false" fo:orphans="1"/>
      <style:text-properties officeooo:rsid="001d9d8c"/>
    </style:style>
    <style:style style:name="P25" style:family="paragraph" style:parent-style-name="Text_20_body" style:list-style-name="L6">
      <style:paragraph-properties fo:margin-top="0.0402in" fo:margin-bottom="0in" style:contextual-spacing="false" fo:orphans="1"/>
      <style:text-properties officeooo:rsid="001d9d8c"/>
    </style:style>
    <style:style style:name="P26" style:family="paragraph" style:parent-style-name="Text_20_body" style:list-style-name="L6">
      <style:paragraph-properties fo:margin-top="0.0402in" fo:margin-bottom="0.1965in" style:contextual-spacing="false" fo:orphans="1"/>
      <style:text-properties officeooo:rsid="001d9d8c"/>
    </style:style>
    <style:style style:name="P27" style:family="paragraph" style:parent-style-name="Text_20_body" style:list-style-name="L7">
      <style:paragraph-properties fo:margin-top="0.0402in" fo:margin-bottom="0in" style:contextual-spacing="false" fo:orphans="1"/>
      <style:text-properties officeooo:rsid="001d9d8c"/>
    </style:style>
    <style:style style:name="P28" style:family="paragraph" style:parent-style-name="Text_20_body" style:list-style-name="L7">
      <style:paragraph-properties fo:margin-top="0.0402in" fo:margin-bottom="0in" style:contextual-spacing="false" fo:orphans="1" style:writing-mode="lr-tb" style:writing-mode-automatic="false"/>
      <style:text-properties officeooo:rsid="001d9d8c"/>
    </style:style>
    <style:style style:name="P29" style:family="paragraph" style:parent-style-name="Text_20_body" style:list-style-name="L7">
      <style:paragraph-properties fo:margin-top="0.0402in" fo:margin-bottom="0.1965in" style:contextual-spacing="false" fo:orphans="1"/>
      <style:text-properties officeooo:rsid="001d9d8c"/>
    </style:style>
    <style:style style:name="P30" style:family="paragraph" style:parent-style-name="Text_20_body" style:list-style-name="L8">
      <style:paragraph-properties fo:margin-top="0.0402in" fo:margin-bottom="0in" style:contextual-spacing="false" fo:orphans="1"/>
      <style:text-properties officeooo:rsid="001d9d8c"/>
    </style:style>
    <style:style style:name="P31" style:family="paragraph" style:parent-style-name="Text_20_body" style:list-style-name="L8">
      <style:paragraph-properties fo:margin-top="0.0402in" fo:margin-bottom="0.1965in" style:contextual-spacing="false" fo:orphans="1"/>
      <style:text-properties officeooo:rsid="001d9d8c"/>
    </style:style>
    <style:style style:name="P32" style:family="paragraph" style:parent-style-name="Text_20_body" style:list-style-name="L9">
      <style:paragraph-properties fo:margin-top="0.0402in" fo:margin-bottom="0in" style:contextual-spacing="false" fo:orphans="1"/>
      <style:text-properties officeooo:rsid="001d9d8c"/>
    </style:style>
    <style:style style:name="P33" style:family="paragraph" style:parent-style-name="Text_20_body" style:list-style-name="L9">
      <style:paragraph-properties fo:margin-top="0.0402in" fo:margin-bottom="0.1965in" style:contextual-spacing="false" fo:orphans="1"/>
      <style:text-properties officeooo:rsid="001d9d8c"/>
    </style:style>
    <style:style style:name="P34" style:family="paragraph" style:parent-style-name="Heading_20_2">
      <style:paragraph-properties fo:margin-top="0.0402in" fo:margin-bottom="0.0598in" style:contextual-spacing="false" fo:line-height="115%" fo:orphans="1"/>
      <style:text-properties style:font-name="Nimbus Roman" officeooo:rsid="001d9d8c"/>
    </style:style>
    <style:style style:name="P35" style:family="paragraph" style:parent-style-name="Text_20_body" style:list-style-name="L10">
      <style:paragraph-properties fo:margin-top="0.0402in" fo:margin-bottom="0in" style:contextual-spacing="false" fo:orphans="1"/>
      <style:text-properties officeooo:rsid="001d9d8c"/>
    </style:style>
    <style:style style:name="P36" style:family="paragraph" style:parent-style-name="Text_20_body" style:list-style-name="L10">
      <style:paragraph-properties fo:margin-top="0.0402in" fo:margin-bottom="0.1965in" style:contextual-spacing="false" fo:orphans="1"/>
      <style:text-properties officeooo:rsid="001d9d8c"/>
    </style:style>
    <style:style style:name="P37" style:family="paragraph" style:parent-style-name="Text_20_body" style:list-style-name="L11">
      <style:paragraph-properties fo:margin-top="0.0402in" fo:margin-bottom="0in" style:contextual-spacing="false" fo:orphans="1"/>
      <style:text-properties officeooo:rsid="001d9d8c"/>
    </style:style>
    <style:style style:name="P38" style:family="paragraph" style:parent-style-name="Text_20_body" style:list-style-name="L11">
      <style:paragraph-properties fo:margin-top="0.0402in" fo:margin-bottom="0.1965in" style:contextual-spacing="false" fo:orphans="1"/>
      <style:text-properties style:font-name="Nimbus Roman" officeooo:rsid="001d9d8c"/>
    </style:style>
    <style:style style:name="T1" style:family="text">
      <style:text-properties officeooo:rsid="0012b26b"/>
    </style:style>
    <style:style style:name="T2" style:family="text">
      <style:text-properties fo:font-size="12pt" style:font-size-asian="10.5pt" style:font-size-complex="12pt"/>
    </style:style>
    <style:style style:name="T3" style:family="text">
      <style:text-properties fo:font-size="12pt" fo:font-style="italic" style:font-size-asian="10.5pt" style:font-style-asian="italic" style:font-size-complex="12pt" style:font-style-complex="italic"/>
    </style:style>
    <style:style style:name="T4" style:family="text">
      <style:text-properties fo:font-size="12pt" officeooo:rsid="001480cc" style:font-size-asian="10.5pt" style:font-size-complex="12pt"/>
    </style:style>
    <style:style style:name="T5" style:family="text">
      <style:text-properties officeooo:rsid="0015c565"/>
    </style:style>
    <style:style style:name="T6" style:family="text">
      <style:text-properties officeooo:rsid="001756bc"/>
    </style:style>
    <style:style style:name="T7" style:family="text">
      <style:text-properties fo:font-weight="normal" officeooo:rsid="001756bc"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font-name="Nimbus Roman"/>
    </style:style>
    <style:style style:name="T11" style:family="text">
      <style:text-properties style:font-name="Nimbus Roman" officeooo:rsid="00220c9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kspertni sistem za optimizaciju menija i upravljanje osoboljem</text:p>
      <text:p text:style-name="P2"/>
      <text:list text:style-name="L1">
        <text:list-item>
          <text:p text:style-name="P3">Spisak članova:</text:p>
          <text:list>
            <text:list-item>
              <text:p text:style-name="P4">Filip Čonić</text:p>
            </text:list-item>
          </text:list>
        </text:list-item>
      </text:list>
      <text:p text:style-name="P5"/>
      <text:list text:continue-numbering="true" text:style-name="L1">
        <text:list-item>
          <text:p text:style-name="P3">Motivacija</text:p>
          <text:list>
            <text:list-item>
              <text:p text:style-name="P4">Lično interesovanje i razumevanje teme. Mnogi restorani imaju izazove vezane za profitabilnost i sa isplaćivanjem broja zaposlenog osoblja. Odluke se donose intuitivno, bez preterane obrade podataka. Jela koja ne stvaraju veliki profit ostaju na meniju jer su kuvari ili vlasnici vezani zaideju tog jela i umesto da se poboljša na neki način ili zameni, ono ostaje nepromenjeno. Takođe dolazi do toga da se ne može ispratiti produktivnost osoblja, nego se <text:span text:style-name="T1">produktivnost procenjuje po bliskošću sa ostatkom osoblja i slično. Cilj ovog projekta je da centralizuje informacije i nagovesti vlasniku ili menadžeru kako treba da donose odluke.</text:span></text:p>
            </text:list-item>
          </text:list>
        </text:list-item>
      </text:list>
      <text:p text:style-name="P5"/>
      <text:list text:continue-numbering="true" text:style-name="L1">
        <text:list-item>
          <text:p text:style-name="P6">Pregled problema</text:p>
          <text:list>
            <text:list-item>
              <text:p text:style-name="P7"><text:span text:style-name="T2">Problem upravljanja restoranom je komplikovan jer sadrži mnogo mogućih ulaza koji se trebaju grupisati radi smanjivanja dimenzionalnosti problema. Postojeća rešenja su uglavnom u obliku </text:span><text:span text:style-name="T3">Point of Sale</text:span><text:span text:style-name="T2"> sistema, gde su najpoznatiji </text:span><text:span text:style-name="T3">Square for Restaurants</text:span><text:span text:style-name="T2"> i </text:span><text:span text:style-name="T3">Toast POS</text:span><text:span text:style-name="T2">. Oni prikupljaju podatke i olakšavaju taj deo posla, ali ne donose nikakve inteligentne odluke. Oni proizvode izveštaje na osnovu kojih bi vlasnik mogao doneti odluku. Sa brojem stavki koje su moge pronaći na izveštajima ljudsko biće ne može doneti nikakve odluke. Zbog je potebno uvesti Rule-Based Engine </text:span><text:span text:style-name="T4">koji može obrađivati podatke i donositi inteligentne odluke.</text:span></text:p>
            </text:list-item>
          </text:list>
        </text:list-item>
      </text:list>
      <text:p text:style-name="P8"/>
      <text:list text:continue-numbering="true" text:style-name="L1">
        <text:list-item>
          <text:h text:style-name="P9" text:outline-level="4">Ulazi u sistem</text:h>
          <text:list>
            <text:list-item>
              <text:p text:style-name="P10">Podaci o jelima: naziv, kategorija, cena, trošak pripreme, <text:span text:style-name="T5">nedeljna</text:span> prodaja, <text:span text:style-name="T5">sezona</text:span></text:p>
            </text:list-item>
            <text:list-item>
              <text:p text:style-name="P11">Podaci o konobarima: ime, broj opsluženih stolova po sm<text:span text:style-name="T5">e</text:span>ni, prosečna vrednost <text:span text:style-name="T6">p</text:span><text:span text:style-name="Strong_20_Emphasis"><text:span text:style-name="T7">orudžbine</text:span></text:span>, ocene gostiju </text:p>
            </text:list-item>
            <text:list-item>
              <text:p text:style-name="P10">Podaci o smenama: datum, konobar, broj gostiju, ukupna zarada smene </text:p>
            </text:list-item>
            <text:list-item>
              <text:p text:style-name="P10">Podaci o transakcijama: narudžb<text:span text:style-name="T5">in</text:span>e po stolu, jela, konobari koji su ih opslužili</text:p>
            </text:list-item>
          </text:list>
        </text:list-item>
      </text:list>
      <text:p text:style-name="P12"/>
      <text:list text:continue-numbering="true" text:style-name="L1">
        <text:list-item>
          <text:h text:style-name="P13" text:outline-level="4"><text:soft-page-break/>Izlazi iz sistema</text:h>
          <text:list>
            <text:list-item>
              <text:p text:style-name="P10">Preporuke za meni: ukloni jelo / promeni cenu / pokreni promociju / dodaj novo jelo </text:p>
            </text:list-item>
            <text:list-item>
              <text:p text:style-name="P10">Preporuke za osoblje: upozorenje / dodatna obuka / nagrada / preraspoređivanje po sm<text:span text:style-name="T5">e</text:span>nama </text:p>
            </text:list-item>
            <text:list-item>
              <text:p text:style-name="P10">CEP upozorenja u realnom vremenu: nagli pad prodaje određenog jela, neobičan obrazac narudžbi, pad produktivnosti konobara tokom smjene </text:p>
            </text:list-item>
            <text:list-item>
              <text:p text:style-name="P10">Izveštaj sa obrazloženjem za svaku preporuku</text:p>
            </text:list-item>
          </text:list>
        </text:list-item>
      </text:list>
      <text:p text:style-name="P12"/>
      <text:list text:continue-numbering="true" text:style-name="L1">
        <text:list-item>
          <text:h text:style-name="P14" text:outline-level="3">Baza znanja</text:h>
          <text:list>
            <text:list-item>
              <text:p text:style-name="P10">Baza znanja sistema sastoji se od tri komponente: <text:span text:style-name="Strong_20_Emphasis"><text:span text:style-name="T8">entiteta</text:span></text:span>, <text:span text:style-name="Strong_20_Emphasis"><text:span text:style-name="T8">činjenica</text:span></text:span> i <text:span text:style-name="Strong_20_Emphasis"><text:span text:style-name="T8">izvedenih</text:span></text:span><text:span text:style-name="Strong_20_Emphasis"><text:span text:style-name="T9"> </text:span></text:span><text:span text:style-name="Strong_20_Emphasis"><text:span text:style-name="T8">činjenica</text:span></text:span>.</text:p>
            </text:list-item>
          </text:list>
        </text:list-item>
      </text:list>
      <text:list text:style-name="L2">
        <text:list-item>
          <text:h text:style-name="P15" text:outline-level="4">Entiteti</text:h>
          <text:list>
            <text:list-item>
              <text:p text:style-name="P16"><text:span text:style-name="Strong_20_Emphasis"><text:span text:style-name="T8">Jelo</text:span></text:span><text:span text:style-name="T9"> </text:span>predstavlja osnovnu stavku menija i sadrži naziv, kategoriju (predjelo, glavno jelo, desert, piće), prodajnu cijenu, trošak pripreme i prosečnu <text:span text:style-name="T6">nedeljnu</text:span> prodaju.</text:p>
            </text:list-item>
            <text:list-item>
              <text:p text:style-name="P16"><text:span text:style-name="Strong_20_Emphasis"><text:span text:style-name="T8">Konobar</text:span></text:span><text:span text:style-name="T9"> </text:span>predstavlja zaposlenog u sali i karakteriše ga ime, prosečan broj opsluženih stolova po smeni, pros<text:span text:style-name="T6">e</text:span>čna vrednost narudžbe koju ostvari i prosečna ocena od strane gostiju.</text:p>
            </text:list-item>
            <text:list-item>
              <text:p text:style-name="P16"><text:span text:style-name="Strong_20_Emphasis"><text:span text:style-name="T8">Smena</text:span></text:span><text:span text:style-name="T9"> </text:span>predstavlja jedan radni period i vezana je za konkretnog konobara. Sadrži datum, broj gostiju koje je konobar opslužio i ukupnu zaradu ostvarenu tokom te smene.</text:p>
            </text:list-item>
            <text:list-item>
              <text:p text:style-name="P16"><text:span text:style-name="Strong_20_Emphasis"><text:span text:style-name="T7">Porudžbina</text:span></text:span><text:span text:style-name="T9"> </text:span>predstavlja pojedinačnu transakciju i vezana je za sto, konobara i listu naručenih jela, sa datumom i vremenom kreiranja.</text:p>
            </text:list-item>
          </text:list>
        </text:list-item>
      </text:list>
      <text:list xml:id="list1422841923" text:style-name="L3">
        <text:list-item>
          <text:h text:style-name="P17" text:outline-level="4">Činjenice</text:h>
          <text:list>
            <text:list-item>
              <text:p text:style-name="P18">Činjenice su konkretni podaci koji se unose u sistem i čine polaznu osnovu za zaključivanje. Popunjavaju se na dva načina - ručnim unosom od strane menadžera kroz interfejs i automatski iz POS sistema na kraju svake smjene.</text:p>
            </text:list-item>
            <text:list-item>
              <text:p text:style-name="P18">Konkretne činjenice koje sistem koristi su:</text:p>
            </text:list-item>
          </text:list>
        </text:list-item>
      </text:list>
      <text:list text:style-name="L4">
        <text:list-item>
          <text:list>
            <text:list-item>
              <text:list>
                <text:list-item>
                  <text:p text:style-name="P19">Naziv, kategorija, cena i trošak pripreme za svako jelo na meniju </text:p>
                </text:list-item>
                <text:list-item>
                  <text:p text:style-name="P19"><text:span text:style-name="T6">Nedeljna</text:span> prodaja po jelu (koliko komada je prodato) </text:p>
                </text:list-item>
                <text:list-item>
                  <text:p text:style-name="P19">Za svakog konobara: broj stolova po smeni, prosečna vrednost <text:span text:style-name="T6">porudžbine</text:span> i ocena gostiju </text:p>
                </text:list-item>
                <text:list-item>
                  <text:p text:style-name="P19">Za svaku smenu: datum, konobar, broj gostiju i ukupna zarada </text:p>
                </text:list-item>
                <text:list-item>
                  <text:p text:style-name="P19">Evidencija reklamacija i storniranja narudžbi po konobaru i jelu </text:p>
                </text:list-item>
              </text:list>
            </text:list-item>
          </text:list>
        </text:list-item>
      </text:list>
      <text:list text:continue-list="list1422841923" text:style-name="L3">
        <text:list-item>
          <text:h text:style-name="P17" text:outline-level="4"><text:soft-page-break/>Izvedene činjenice</text:h>
          <text:list>
            <text:list-item>
              <text:p text:style-name="P18">Izvedene činjenice nisu direktno unesene, već ih sistem sam zaključuje primjenom pravila na postojeće činjenice. Tokom rada sistema izvode se sljedeće činjenice:</text:p>
            </text:list-item>
          </text:list>
        </text:list-item>
      </text:list>
      <text:list text:style-name="L5">
        <text:list-item>
          <text:list>
            <text:list-item>
              <text:list>
                <text:list-item>
                  <text:p text:style-name="P20"><text:span text:style-name="Strong_20_Emphasis"><text:span text:style-name="T8">Profit margin jela</text:span></text:span><text:span text:style-name="T8"> - izračunava se iz prodajne cijene i troška pripreme </text:span></text:p>
                </text:list-item>
                <text:list-item>
                  <text:p text:style-name="P20"><text:span text:style-name="Strong_20_Emphasis"><text:span text:style-name="T8">Bestseller status jela</text:span></text:span><text:span text:style-name="T8"> - izvodi se ako </text:span><text:span text:style-name="T7">nedeljna</text:span><text:span text:style-name="T8"> prodaja prelazi definisani prag </text:span></text:p>
                </text:list-item>
                <text:list-item>
                  <text:p text:style-name="P20"><text:span text:style-name="Strong_20_Emphasis"><text:span text:style-name="T8">Efikasnost konobara</text:span></text:span><text:span text:style-name="T8"> - izvodi se na osnovu broja stolova i ocjene gostiju </text:span></text:p>
                </text:list-item>
                <text:list-item>
                  <text:p text:style-name="P20"><text:span text:style-name="Strong_20_Emphasis"><text:span text:style-name="T8">Zarada po gostu po smeni</text:span></text:span><text:span text:style-name="T8"> - izvodi se deljenjem ukupne zarade sa brojem gostiju </text:span></text:p>
                </text:list-item>
                <text:list-item>
                  <text:p text:style-name="P20"><text:span text:style-name="Strong_20_Emphasis"><text:span text:style-name="T8">Neisplativost jela</text:span></text:span><text:span text:style-name="T8"> - izvodi se ako su profit margin i </text:span><text:span text:style-name="T7">nedeljna</text:span><text:span text:style-name="T8"> prodaja ispod pragova </text:span></text:p>
                </text:list-item>
                <text:list-item>
                  <text:p text:style-name="P20"><text:span text:style-name="Strong_20_Emphasis"><text:span text:style-name="T8">Potencijal jela</text:span></text:span><text:span text:style-name="T8"> - izvodi se ako jelo ima visok margin ali nisku prodaju </text:span></text:p>
                </text:list-item>
                <text:list-item>
                  <text:p text:style-name="P20"><text:span text:style-name="Strong_20_Emphasis"><text:span text:style-name="T8">Problematičan konobar</text:span></text:span><text:span text:style-name="T8"> - izvodi se ako konobar nije efikasan i ima nisku ocenu </text:span></text:p>
                </text:list-item>
                <text:list-item>
                  <text:p text:style-name="P20"><text:span text:style-name="Strong_20_Emphasis"><text:span text:style-name="T8">Loša smena</text:span></text:span><text:span text:style-name="T8"> - izvodi se ako je zarada po gostu znatno ispod proseka </text:span></text:p>
                </text:list-item>
                <text:list-item>
                  <text:p text:style-name="P20"><text:span text:style-name="Strong_20_Emphasis"><text:span text:style-name="T8">Konzistentno loš konobar</text:span></text:span><text:span text:style-name="T8"> - izvodi se akumulacijom loših smjena u zadnj</text:span><text:span text:style-name="T7">e dve nedelje</text:span></text:p>
                </text:list-item>
              </text:list>
            </text:list-item>
          </text:list>
        </text:list-item>
      </text:list>
      <text:p text:style-name="P21"/>
      <text:h text:style-name="P22" text:outline-level="2">Pravila unapred (Forward Chaining) - menu-staff-rules.drl</text:h>
      <text:p text:style-name="P23">Izvršavaju se od najvišeg ka najnižem salience nivou, svaki nivo zavisi od činjenica koje je kreirao prethodni nivo.</text:p>
      <text:p text:style-name="P24"><text:span text:style-name="Strong_20_Emphasis"><text:span text:style-name="T10">Nivo 1 - salience 100 (sirovi podaci → izvedene činjenice)</text:span></text:span></text:p>
      <text:list text:style-name="L6">
        <text:list-item>
          <text:p text:style-name="P25"><text:span text:style-name="T10">Calculate Profit Margin - za svaki MenuItem koji još nema MenuItemFact, kreira ga sa </text:span><text:span text:style-name="Source_20_Text"><text:span text:style-name="T10">profitMargin = (price − preparationCost) / price</text:span></text:span><text:span text:style-name="T10"> </text:span></text:p>
        </text:list-item>
        <text:list-item>
          <text:p text:style-name="P26"><text:span text:style-name="T10">Calculate Earning by Guest - za svaku Shift sa guestCount &gt; 0 koja još nema ShiftFact za taj datum, kreira je sa </text:span><text:span text:style-name="Source_20_Text"><text:span text:style-name="T10">earningsPerGuest = totalEarnings / guestCount</text:span></text:span><text:span text:style-name="T10">, i prepisuje </text:span><text:span text:style-name="Source_20_Text"><text:span text:style-name="T10">waiterIds</text:span></text:span><text:span text:style-name="T10"> </text:span></text:p>
        </text:list-item>
      </text:list>
      <text:p text:style-name="P24"><text:span text:style-name="Strong_20_Emphasis"><text:span text:style-name="T10">Nivo 2 - salience 80 (klasifikacija u flagove)</text:span></text:span></text:p>
      <text:list text:style-name="L7">
        <text:list-item>
          <text:p text:style-name="P27"><text:span text:style-name="T10">Mark Bestseller - </text:span><text:span text:style-name="Source_20_Text"><text:span text:style-name="T10">weeklySales ≥ 30</text:span></text:span><text:span text:style-name="T10"> → </text:span><text:span text:style-name="Source_20_Text"><text:span text:style-name="T10">bestseller = true</text:span></text:span><text:span text:style-name="T10"> </text:span></text:p>
        </text:list-item>
        <text:list-item>
          <text:p text:style-name="P27"><text:span text:style-name="T10">Mark Unprofitable - </text:span><text:span text:style-name="Source_20_Text"><text:span text:style-name="T10">weeklySales &lt; 20</text:span></text:span><text:span text:style-name="T10"> i </text:span><text:span text:style-name="Source_20_Text"><text:span text:style-name="T10">profitMargin &lt; 0.2</text:span></text:span><text:span text:style-name="T10"> → </text:span><text:span text:style-name="Source_20_Text"><text:span text:style-name="T10">unprofitable = true</text:span></text:span><text:span text:style-name="T10"> </text:span></text:p>
        </text:list-item>
        <text:list-item>
          <text:p text:style-name="P27"><text:span text:style-name="T10">Mark High Potential - </text:span><text:span text:style-name="Source_20_Text"><text:span text:style-name="T10">weeklySales &lt; 15</text:span></text:span><text:span text:style-name="T10"> i </text:span><text:span text:style-name="Source_20_Text"><text:span text:style-name="T10">profitMargin &gt; 0.4</text:span></text:span><text:span text:style-name="T10"> → </text:span><text:span text:style-name="Source_20_Text"><text:span text:style-name="T10">highPotential = true</text:span></text:span><text:span text:style-name="T10"> </text:span></text:p>
        </text:list-item>
        <text:list-item>
          <text:p text:style-name="P27"><text:span text:style-name="T10">Mark Bad Shift - koristi </text:span><text:span text:style-name="Source_20_Text"><text:span text:style-name="T10">accumulate(average(earningsPerGuest))</text:span></text:span><text:span text:style-name="T10"> preko svih smena, ako je sopstvena vrednost smene </text:span><text:span text:style-name="Source_20_Text"><text:span text:style-name="T10">&lt; 70%</text:span></text:span><text:span text:style-name="T10"> od tog proseka → </text:span><text:span text:style-name="Source_20_Text"><text:span text:style-name="T10">badShift = true</text:span></text:span><text:span text:style-name="T10"> </text:span></text:p>
        </text:list-item>
        <text:list-item>
          <text:p text:style-name="P27"><text:span text:style-name="T10">Mark Good Shift - isti accumulate, ako je </text:span><text:span text:style-name="Source_20_Text"><text:span text:style-name="T10">&gt; 120%</text:span></text:span><text:span text:style-name="T10"> od proseka → </text:span><text:span text:style-name="Source_20_Text"><text:span text:style-name="T10">goodShift = true</text:span></text:span><text:span text:style-name="T10"> </text:span></text:p>
        </text:list-item>
        <text:list-item>
          <text:p text:style-name="P28"><text:span text:style-name="T10">Mark Problematic Waiter - </text:span><text:span text:style-name="Source_20_Text"><text:span text:style-name="T10">guestRating &lt; 3.0</text:span></text:span><text:span text:style-name="T10"> i </text:span><text:span text:style-name="Source_20_Text"><text:span text:style-name="T10">avgTablesPerShift &lt; 5.0</text:span></text:span><text:span text:style-name="T10"> → kreira WaiterFact sa </text:span><text:span text:style-name="Source_20_Text"><text:span text:style-name="T10">problematic = true</text:span></text:span><text:span text:style-name="T10"> </text:span></text:p>
        </text:list-item>
        <text:list-item>
          <text:p text:style-name="P29"><text:soft-page-break/><text:span text:style-name="T10">Mark Excellent Waiter - </text:span><text:span text:style-name="Source_20_Text"><text:span text:style-name="T10">guestRating ≥ 4.5</text:span></text:span><text:span text:style-name="T10"> i </text:span><text:span text:style-name="Source_20_Text"><text:span text:style-name="T10">avgTablesPerShift ≥ 8.0</text:span></text:span><text:span text:style-name="T10"> → kreira WaiterFact sa </text:span><text:span text:style-name="Source_20_Text"><text:span text:style-name="T10">excellent = true</text:span></text:span><text:span text:style-name="T10"> </text:span></text:p>
        </text:list-item>
      </text:list>
      <text:p text:style-name="P24"><text:span text:style-name="Strong_20_Emphasis"><text:span text:style-name="T10">Nivo 3 - salience 60 (obrasci kroz vreme)</text:span></text:span></text:p>
      <text:list text:style-name="L8">
        <text:list-item>
          <text:p text:style-name="P30"><text:span text:style-name="T10">Mark Price Problem - MenuItemFact je istovremeno </text:span><text:span text:style-name="Source_20_Text"><text:span text:style-name="T10">unprofitable</text:span></text:span><text:span text:style-name="T10"> i </text:span><text:span text:style-name="Source_20_Text"><text:span text:style-name="T10">bestseller</text:span></text:span><text:span text:style-name="T10"> → </text:span><text:span text:style-name="Source_20_Text"><text:span text:style-name="T10">priceProblem = true</text:span></text:span><text:span text:style-name="T10"> (dobro se prodaje, ali gubi novac) </text:span></text:p>
        </text:list-item>
        <text:list-item>
          <text:p text:style-name="P30"><text:span text:style-name="T10">Mark Consistently Bad Waiter - koristi </text:span><text:span text:style-name="Source_20_Text"><text:span text:style-name="T10">accumulate(count(1))</text:span></text:span><text:span text:style-name="T10"> da prebroji </text:span><text:span text:style-name="Source_20_Text"><text:span text:style-name="T10">badShift</text:span></text:span><text:span text:style-name="T10"> smene za tog konobara (</text:span><text:span text:style-name="Source_20_Text"><text:span text:style-name="T10">waiterIds contains id</text:span></text:span><text:span text:style-name="T10">) u poslednje dve nedelje, </text:span><text:span text:style-name="Source_20_Text"><text:span text:style-name="T10">≥ 6</text:span></text:span><text:span text:style-name="T10"> → </text:span><text:span text:style-name="Source_20_Text"><text:span text:style-name="T10">consistentlyBad = true</text:span></text:span><text:span text:style-name="T10"> </text:span></text:p>
        </text:list-item>
        <text:list-item>
          <text:p text:style-name="P31"><text:span text:style-name="T10">Mark Consistently Good Waiter – ist</text:span><text:span text:style-name="T11">o</text:span><text:span text:style-name="T10"> za </text:span><text:span text:style-name="Source_20_Text"><text:span text:style-name="T10">goodShift</text:span></text:span><text:span text:style-name="T10"> → </text:span><text:span text:style-name="Source_20_Text"><text:span text:style-name="T10">consistentlyGood = true</text:span></text:span><text:span text:style-name="T10"> </text:span></text:p>
        </text:list-item>
      </text:list>
      <text:p text:style-name="P24"><text:span text:style-name="Strong_20_Emphasis"><text:span text:style-name="T10">Nivo 4 - salience 40 (generisanje preporuka)</text:span></text:span></text:p>
      <text:list text:style-name="L9">
        <text:list-item>
          <text:p text:style-name="P32"><text:span text:style-name="T10">Recommend Remove Item - </text:span><text:span text:style-name="Source_20_Text"><text:span text:style-name="T10">unprofitable</text:span></text:span><text:span text:style-name="T10"> i NIJE </text:span><text:span text:style-name="Source_20_Text"><text:span text:style-name="T10">priceProblem</text:span></text:span><text:span text:style-name="T10"> → </text:span><text:span text:style-name="Source_20_Text"><text:span text:style-name="T10">REMOVE_ITEM</text:span></text:span><text:span text:style-name="T10"> </text:span></text:p>
        </text:list-item>
        <text:list-item>
          <text:p text:style-name="P32"><text:span text:style-name="T10">Recommend Change Price - </text:span><text:span text:style-name="Source_20_Text"><text:span text:style-name="T10">priceProblem</text:span></text:span><text:span text:style-name="T10"> → </text:span><text:span text:style-name="Source_20_Text"><text:span text:style-name="T10">CHANGE_PRICE</text:span></text:span><text:span text:style-name="T10"> </text:span></text:p>
        </text:list-item>
        <text:list-item>
          <text:p text:style-name="P32"><text:span text:style-name="T10">Recommend Promotion - </text:span><text:span text:style-name="Source_20_Text"><text:span text:style-name="T10">highPotential</text:span></text:span><text:span text:style-name="T10"> → </text:span><text:span text:style-name="Source_20_Text"><text:span text:style-name="T10">START_PROMOTION</text:span></text:span><text:span text:style-name="T10"> </text:span></text:p>
        </text:list-item>
        <text:list-item>
          <text:p text:style-name="P32"><text:span text:style-name="T10">Recommend Add New Item - kategorija nema bestseler → </text:span><text:span text:style-name="Source_20_Text"><text:span text:style-name="T10">ADD_NEW_ITEM</text:span></text:span><text:span text:style-name="T10"> </text:span></text:p>
        </text:list-item>
        <text:list-item>
          <text:p text:style-name="P32"><text:span text:style-name="T10">Recommend Waiter Warning - </text:span><text:span text:style-name="Source_20_Text"><text:span text:style-name="T10">problematic</text:span></text:span><text:span text:style-name="T10"> i NIJE </text:span><text:span text:style-name="Source_20_Text"><text:span text:style-name="T10">consistentlyBad</text:span></text:span><text:span text:style-name="T10"> → </text:span><text:span text:style-name="Source_20_Text"><text:span text:style-name="T10">WAITER_WARNING</text:span></text:span><text:span text:style-name="T10"> </text:span></text:p>
        </text:list-item>
        <text:list-item>
          <text:p text:style-name="P32"><text:span text:style-name="T10">Recommend Additional Training - </text:span><text:span text:style-name="Source_20_Text"><text:span text:style-name="T10">consistentlyBad</text:span></text:span><text:span text:style-name="T10"> → </text:span><text:span text:style-name="Source_20_Text"><text:span text:style-name="T10">ADDITIONAL_TRAINING</text:span></text:span><text:span text:style-name="T10"> </text:span></text:p>
        </text:list-item>
        <text:list-item>
          <text:p text:style-name="P33"><text:span text:style-name="T10">Recommend Waiter Reward - </text:span><text:span text:style-name="Source_20_Text"><text:span text:style-name="T10">consistentlyGood</text:span></text:span><text:span text:style-name="T10"> → </text:span><text:span text:style-name="Source_20_Text"><text:span text:style-name="T10">WAITER_REWARD</text:span></text:span><text:span text:style-name="T10"> </text:span></text:p>
        </text:list-item>
      </text:list>
      <text:h text:style-name="P34" text:outline-level="2">Zaključivanje unazad (Backward Chaining) - BackwardChainingEngine.java</text:h>
      <text:p text:style-name="P23">Vođeno ciljem: kreće od da/ne pitanja, razlaže ga na podciljeve i staje čim jedan podcilj ne prođe. Radi ispravno tek pošto se bar jednom pokrene zaključivanje unapred (čita WaiterFact/MenuItemFact).</text:p>
      <text:list text:style-name="L10">
        <text:list-item>
          <text:p text:style-name="P35"><text:span text:style-name="Strong_20_Emphasis"><text:span text:style-name="T10">Da li konobara treba otpustiti?</text:span></text:span><text:span text:style-name="T10"> - </text:span><text:span text:style-name="Source_20_Text"><text:span text:style-name="T10">consistentlyBad</text:span></text:span><text:span text:style-name="T10"> i </text:span><text:span text:style-name="Source_20_Text"><text:span text:style-name="T10">problematic</text:span></text:span><text:span text:style-name="T10"> i (sveža provera) </text:span><text:span text:style-name="Source_20_Text"><text:span text:style-name="T10">guestRating &lt; 2.5</text:span></text:span><text:span text:style-name="T10"> </text:span></text:p>
        </text:list-item>
        <text:list-item>
          <text:p text:style-name="P35"><text:span text:style-name="Strong_20_Emphasis"><text:span text:style-name="T10">Da li konobar treba da dobije nagradu?</text:span></text:span><text:span text:style-name="T10"> - </text:span><text:span text:style-name="Source_20_Text"><text:span text:style-name="T10">consistentlyGood</text:span></text:span><text:span text:style-name="T10"> i </text:span><text:span text:style-name="Source_20_Text"><text:span text:style-name="T10">excellent</text:span></text:span><text:span text:style-name="T10"> i (sveža provera) </text:span><text:span text:style-name="Source_20_Text"><text:span text:style-name="T10">guestRating ≥ 4.5</text:span></text:span><text:span text:style-name="T10"> </text:span></text:p>
        </text:list-item>
        <text:list-item>
          <text:p text:style-name="P35"><text:span text:style-name="Strong_20_Emphasis"><text:span text:style-name="T10">Da li stavku menija treba promovisati?</text:span></text:span><text:span text:style-name="T10"> - </text:span><text:span text:style-name="Source_20_Text"><text:span text:style-name="T10">highPotential</text:span></text:span><text:span text:style-name="T10"> i NIJE </text:span><text:span text:style-name="Source_20_Text"><text:span text:style-name="T10">bestseller</text:span></text:span><text:span text:style-name="T10"> i </text:span><text:span text:style-name="Source_20_Text"><text:span text:style-name="T10">profitMargin &gt; 0.3</text:span></text:span><text:span text:style-name="T10"> </text:span></text:p>
        </text:list-item>
        <text:list-item>
          <text:p text:style-name="P36"><text:span text:style-name="Strong_20_Emphasis"><text:span text:style-name="T10">Da li stavku menija treba ukloniti?</text:span></text:span><text:span text:style-name="T10"> - </text:span><text:span text:style-name="Source_20_Text"><text:span text:style-name="T10">unprofitable</text:span></text:span><text:span text:style-name="T10"> i NIJE </text:span><text:span text:style-name="Source_20_Text"><text:span text:style-name="T10">priceProblem</text:span></text:span><text:span text:style-name="T10"> i (sveža provera) </text:span><text:span text:style-name="Source_20_Text"><text:span text:style-name="T10">profitMargin &lt; 0.15</text:span></text:span><text:span text:style-name="T10"> </text:span></text:p>
        </text:list-item>
      </text:list>
      <text:h text:style-name="P34" text:outline-level="2">CEP - cep.drl</text:h>
      <text:p text:style-name="P24"><text:span text:style-name="T10">Zaključuje na osnovu toka vremenski označenih </text:span><text:span text:style-name="Source_20_Text"><text:span text:style-name="T10">StaffingSnapshotEvent</text:span></text:span><text:span text:style-name="T10"> događaja koristeći klizni vremenski prozor, a ne statičan snimak - uslov zavisi od proseka više nedavnih događaja, ne od jednog pojedinačnog.</text:span></text:p>
      <text:list text:style-name="L11">
        <text:list-item>
          <text:p text:style-name="P37"><text:soft-page-break/><text:span text:style-name="Strong_20_Emphasis"><text:span text:style-name="T10">Pokretanje surge pricing-a</text:span></text:span><text:span text:style-name="T10"> - računa </text:span><text:span text:style-name="Source_20_Text"><text:span text:style-name="T10">average(ratio)</text:span></text:span><text:span text:style-name="T10"> (gosti / aktivni konobari) u poslednjih 20 sekundi za dati ID smene, ako je </text:span><text:span text:style-name="Source_20_Text"><text:span text:style-name="T10">≥ 3.0</text:span></text:span><text:span text:style-name="T10"> i još nema aktivnog surge markera za tu smenu, ubacuje </text:span><text:span text:style-name="Source_20_Text"><text:span text:style-name="T10">SurgePricingActive</text:span></text:span><text:span text:style-name="T10"> marker i </text:span><text:span text:style-name="Source_20_Text"><text:span text:style-name="T10">SURGE_PRICING</text:span></text:span><text:span text:style-name="T10"> preporuku </text:span></text:p>
        </text:list-item>
        <text:list-item>
          <text:p text:style-name="P37"><text:span text:style-name="Strong_20_Emphasis"><text:span text:style-name="T10">Gašenje surge pricing-a</text:span></text:span><text:span text:style-name="T10"> - ako marker postoji i prosečan odnos padne ispod </text:span><text:span text:style-name="Source_20_Text"><text:span text:style-name="T10">2.0</text:span></text:span><text:span text:style-name="T10">, marker se uklanja (da bi se ponovo mogao aktivirati kasnije) </text:span></text:p>
        </text:list-item>
        <text:list-item>
          <text:p text:style-name="P38">Dva različita praga (3.0 za pokretanje, 2.0 za gašenje) su namerna histereza, koja sprečava da pravilo naglo pali/gasi kada se odnos nalazi tačno na jednoj graničnoj vrednosti</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Nimbus Mono PS" svg:font-family="'Nimbus Mono PS'" style:font-family-generic="modern" style:font-pitch="fixed"/>
    <style:font-face style:name="Nimbus Roman" svg:font-family="'Nimbus Roman'" style:font-pitch="variable"/>
    <style:font-face style:name="Nimbus Roman1"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imbus Roman1" fo:font-size="12pt" fo:language="en" fo:country="US" style:letter-kerning="true" style:font-name-asian="Nimbus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imbus Roman1" fo:font-size="12pt" fo:language="en" fo:country="US" style:letter-kerning="true" style:font-name-asian="Nimbus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Nimbus Roman1" fo:font-family="'Nimbus Roman'" style:font-family-generic="roman" style:font-pitch="variable" fo:font-size="12pt" fo:font-weight="bold" style:font-name-asian="Nimbus Sans1" style:font-family-asian="'Nimbus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Nimbus Roman1" fo:font-family="'Nimbus Roman'" style:font-family-generic="roman" style:font-pitch="variable" fo:font-size="14pt" fo:font-weight="bold" style:font-name-asian="Nimbus Sans1" style:font-family-asian="'Nimbus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FreeSerif" fo:font-family="FreeSerif" style:font-family-generic="roman" style:font-pitch="variable" fo:font-size="18pt" fo:font-weight="bold" style:font-name-asian="Nimbus Sans1" style:font-family-asian="'Nimbus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Nimbus Mono PS" fo:font-family="'Nimbus Mono PS'" style:font-family-generic="modern" style:font-pitch="fixed" style:font-name-asian="Nimbus Mono PS" style:font-family-asian="'Nimbus Mono PS'" style:font-family-generic-asian="modern" style:font-pitch-asian="fixed" style:font-name-complex="Nimbus Mono PS" style:font-family-complex="'Nimbus Mono PS'"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09:12:44.190424025</meta:creation-date>
    <dc:date>2026-07-04T12:24:19.127701033</dc:date>
    <meta:editing-duration>PT14H14M39S</meta:editing-duration>
    <meta:editing-cycles>7</meta:editing-cycles>
    <meta:generator>LibreOffice/26.2.4.2$Linux_X86_64 LibreOffice_project/620$Build-2</meta:generator>
    <meta:document-statistic meta:table-count="0" meta:image-count="0" meta:object-count="0" meta:page-count="5" meta:paragraph-count="79" meta:word-count="1274" meta:character-count="8041" meta:non-whitespace-character-count="6870"/>
  </office:meta>
</office:document-meta>
</file>